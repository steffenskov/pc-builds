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5.98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24.2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omponent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Pris</text:p>
          </table:table-cell>
          <table:table-cell table:style-name="ce3" office:value-type="string" calcext:value-type="string">
            <text:p>Noter</text:p>
          </table:table-cell>
          <table:table-cell table:style-name="ce1" office:value-type="string" calcext:value-type="string">
            <text:p>Link til model</text:p>
          </table:table-cell>
          <table:table-cell/>
        </table:table-row>
        <table:table-row table:style-name="ro1">
          <table:table-cell office:value-type="string" calcext:value-type="string">
            <text:p>Bundkort</text:p>
          </table:table-cell>
          <table:table-cell office:value-type="string" calcext:value-type="string">
            <text:p>B650 eller B85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Billigste sikre model med kapacitet til opgradering</text:p>
          </table:table-cell>
          <table:table-cell office:value-type="string" calcext:value-type="string">
            <text:p><text:a xlink:href="https://www.pricerunner.dk/pl/35-3415941407/Bundkort/MSI-B850M-Gaming-Plus-Wifi6E-AM5-Micro-ATX-Support-Sammenlign-Priser" xlink:type="simple">https://www.pricerunner.dk/pl/35-3415941407/Bundkort/MSI-B850M-Gaming-Plus-Wifi6E-AM5-Micro-ATX-Support-Sammenlign-Priser</text:a>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7500F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Billigste relevante CPU</text:p>
          </table:table-cell>
          <table:table-cell office:value-type="string" calcext:value-type="string">
            <text:p><text:a xlink:href="https://www.compumail.dk/da/p/amd-cpu-ryzen-5-7500f-3-7ghz-6-kerner-am5-tray-u-koler-1001513790" xlink:type="simple">https://www.compumail.dk/da/p/amd-cpu-ryzen-5-7500f-3-7ghz-6-kerner-am5-tray-u-koler-1001513790</text:a></text:p>
          </table:table-cell>
          <table:table-cell/>
        </table:table-row>
        <table:table-row table:style-name="ro1">
          <table:table-cell office:value-type="string" calcext:value-type="string">
            <text:p>Køler</text:p>
          </table:table-cell>
          <table:table-cell office:value-type="string" calcext:value-type="string">
            <text:p>Thermalright Peerless Assassin 14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illigste gode køler</text:p>
          </table:table-cell>
          <table:table-cell office:value-type="string" calcext:value-type="string">
            <text:p><text:a xlink:href="https://www.compumail.dk/da/p/1002943682" xlink:type="simple">https://www.compumail.dk/da/p/1002943682</text:a></text:p>
          </table:table-cell>
          <table:table-cell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2x16GB DDR5 6000 CL3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Optimale RAM</text:p>
          </table:table-cell>
          <table:table-cell office:value-type="string" calcext:value-type="string">
            <text:p><text:a xlink:href="https://www.pricerunner.dk/pl/38-3339051118/RAM/Patriot-Viper-Venom-DDR5-6000MHz-2x16GB-ECC-%28PVV532G600C30K%29-Sammenlign-Priser" xlink:type="simple">https://www.pricerunner.dk/pl/38-3339051118/RAM/Patriot-Viper-Venom-DDR5-6000MHz-2x16GB-ECC-%28PVV532G600C30K%29-Sammenlign-Priser</text:a> </text:p>
          </table:table-cell>
          <table:table-cell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1TB NVME PCI-E gen 4 el. 5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Billigste kvalitets SSD</text:p>
          </table:table-cell>
          <table:table-cell office:value-type="string" calcext:value-type="string">
            <text:p><text:a xlink:href="https://www.pricerunner.dk/pl/36-3202945150/Harddiske/Samsung-990-PRO-SSD-MZ-V9P1T0BW-1TB-Sammenlign-Priser" xlink:type="simple">https://www.pricerunner.dk/pl/36-3202945150/Harddiske/Samsung-990-PRO-SSD-MZ-V9P1T0BW-1TB-Sammenlign-Priser</text:a> </text:p>
          </table:table-cell>
          <table:table-cell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850W m. 5 udgange til CPU/GFX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ikrer mulighed for CPU/GFX opgradering</text:p>
          </table:table-cell>
          <table:table-cell office:value-type="string" calcext:value-type="string">
            <text:p><text:a xlink:href="https://www.pricerunner.dk/pl/640-3331309634/Stroemforsyning/Seasonic-Focus-GX-850-ATX-3.0-850W-Sammenlign-Priser" xlink:type="simple">https://www.pricerunner.dk/pl/640-3331309634/Stroemforsyning/Seasonic-Focus-GX-850-ATX-3.0-850W-Sammenlign-Priser</text:a> </text:p>
          </table:table-cell>
          <table:table-cell/>
        </table:table-row>
        <table:table-row table:style-name="ro1">
          <table:table-cell office:value-type="string" calcext:value-type="string">
            <text:p>GFX</text:p>
          </table:table-cell>
          <table:table-cell office:value-type="string" calcext:value-type="string">
            <text:p>9060XT 16GB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Billigste fornuftige model</text:p>
          </table:table-cell>
          <table:table-cell office:value-type="string" calcext:value-type="string">
            <text:p><text:a xlink:href="https://www.compumail.dk/da/p/1003433742" xlink:type="simple">https://www.compumail.dk/da/p/1003433742</text:a></text:p>
          </table:table-cell>
          <table:table-cell/>
        </table:table-row>
        <table:table-row table:style-name="ro1">
          <table:table-cell office:value-type="string" calcext:value-type="string">
            <text:p>Kabinet</text:p>
          </table:table-cell>
          <table:table-cell office:value-type="string" calcext:value-type="string">
            <text:p>Frit valg, dette er billigt og *ok*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<text:a xlink:href="https://www.pricerunner.dk/pl/186-3413722573/Kabinetter/Montech-X3-Mesh-Tempered-Glass-Black-Sammenlign-Priser" xlink:type="simple">https://www.pricerunner.dk/pl/186-3413722573/Kabinetter/Montech-X3-Mesh-Tempered-Glass-Black-Sammenlign-Priser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formula="of:=SUM([.C2:.C9])" office:value-type="float" office:value="8901" calcext:value-type="float">
            <text:p>890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ulige besparels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omponent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Besparelse</text:p>
          </table:table-cell>
          <table:table-cell table:style-name="ce3" office:value-type="string" calcext:value-type="string">
            <text:p>Noter</text:p>
          </table:table-cell>
          <table:table-cell table:style-name="ce1" office:value-type="string" calcext:value-type="string">
            <text:p>Link til model</text:p>
          </table:table-cell>
        </table:table-row>
        <table:table-row table:style-name="ro1">
          <table:table-cell office:value-type="string" calcext:value-type="string">
            <text:p>Bundkort</text:p>
          </table:table-cell>
          <table:table-cell office:value-type="string" calcext:value-type="string">
            <text:p>Asrock B650M-HDV/M.2</text:p>
          </table:table-cell>
          <table:table-cell office:value-type="float" office:value="796" calcext:value-type="float">
            <text:p>796</text:p>
          </table:table-cell>
          <table:table-cell table:style-name="Default" table:formula="of:=[.C2]-[.C16]" office:value-type="float" office:value="377" calcext:value-type="float">
            <text:p>377</text:p>
          </table:table-cell>
          <table:table-cell table:style-name="ce4" office:value-type="string" calcext:value-type="string">
            <text:p>Asrock er PT kendt for at brænde CPU’er af, lidt en risiko. Dog formentlig minimal med den valgte CPU</text:p>
          </table:table-cell>
          <table:table-cell office:value-type="string" calcext:value-type="string">
            <text:p><text:a xlink:href="https://www.pricerunner.dk/pl/35-3205546064/Bundkort/Asrock-B650M-HDV-M.2-Sammenlign-Priser" xlink:type="simple">https://www.pricerunner.dk/pl/35-3205546064/Bundkort/Asrock-B650M-HDV-M.2-Sammenlign-Priser</text:a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2x8GB DDR5 6000 CL30</text:p>
          </table:table-cell>
          <table:table-cell office:value-type="float" office:value="849" calcext:value-type="float">
            <text:p>849</text:p>
          </table:table-cell>
          <table:table-cell table:style-name="Default" table:formula="of:=[.C5]-[.C17]" office:value-type="float" office:value="280" calcext:value-type="float">
            <text:p>280</text:p>
          </table:table-cell>
          <table:table-cell table:style-name="ce4" office:value-type="string" calcext:value-type="string">
            <text:p>Kan absolut ikke anbefales, 16GB er lige på vippen til at være for lidt!</text:p>
          </table:table-cell>
          <table:table-cell office:value-type="string" calcext:value-type="string">
            <text:p><text:a xlink:href="https://www.pricerunner.dk/pl/38-3282540364/RAM/Kingston-FURY-Beast-Black-DDR5-6000MHz-2x8GB-%28KF560C30BBEK2-16%29-Sammenlign-Priser" xlink:type="simple">https://www.pricerunner.dk/pl/38-3282540364/RAM/Kingston-FURY-Beast-Black-DDR5-6000MHz-2x8GB-%28KF560C30BBEK2-16%29-Sammenlign-Priser</text:a> 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1TB</text:p>
          </table:table-cell>
          <table:table-cell office:value-type="float" office:value="549" calcext:value-type="float">
            <text:p>549</text:p>
          </table:table-cell>
          <table:table-cell table:formula="of:=[.C6]-[.C18]" office:value-type="float" office:value="325" calcext:value-type="float">
            <text:p>325</text:p>
          </table:table-cell>
          <table:table-cell office:value-type="string" calcext:value-type="string">
            <text:p>Faktisk en OK SSD til prisen, umiddelbart et af de bedre steder at spare</text:p>
          </table:table-cell>
          <table:table-cell office:value-type="string" calcext:value-type="string">
            <text:p><text:a xlink:href="https://www.pricerunner.dk/pl/36-3333559744/Harddiske/Crucial-P310-Gen4-2280-1TB-NVMe-PCIe-M.2-SSD-Sammenlign-Priser" xlink:type="simple">https://www.pricerunner.dk/pl/36-3333559744/Harddiske/Crucial-P310-Gen4-2280-1TB-NVMe-PCIe-M.2-SSD-Sammenlign-Priser</text:a> 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650W m. 1X CPU, 1x GFX</text:p>
          </table:table-cell>
          <table:table-cell office:value-type="float" office:value="459" calcext:value-type="float">
            <text:p>459</text:p>
          </table:table-cell>
          <table:table-cell table:formula="of:=[.C7]-[.C19]" office:value-type="float" office:value="540" calcext:value-type="float">
            <text:p>540</text:p>
          </table:table-cell>
          <table:table-cell office:value-type="string" calcext:value-type="string">
            <text:p>Umuligt at opgradere grafikkort med denne, giver lidt kabel rod da den ikke er modulær, dog OK ud fra driftsikkerhed</text:p>
          </table:table-cell>
          <table:table-cell office:value-type="string" calcext:value-type="string">
            <text:p><text:a xlink:href="https://www.pricerunner.dk/pl/640-3971436/Stroemforsyning/Corsair-CX650-650W-Sammenlign-Priser" xlink:type="simple">https://www.pricerunner.dk/pl/640-3971436/Stroemforsyning/Corsair-CX650-650W-Sammenlign-Priser</text:a> 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750W m. 1X CPU, 2x GFX</text:p>
          </table:table-cell>
          <table:table-cell office:value-type="float" office:value="539" calcext:value-type="float">
            <text:p>539</text:p>
          </table:table-cell>
          <table:table-cell table:formula="of:=[.C7]-[.C20]" office:value-type="float" office:value="460" calcext:value-type="float">
            <text:p>460</text:p>
          </table:table-cell>
          <table:table-cell office:value-type="string" calcext:value-type="string">
            <text:p>Svært at opgradere grafikkort med denne, giver lidt kabel rod da den ikke er modulær, dog OK ud fra driftsikkerhed</text:p>
          </table:table-cell>
          <table:table-cell office:value-type="string" calcext:value-type="string">
            <text:p><text:a xlink:href="https://www.pricerunner.dk/pl/640-3218533316/Stroemforsyning/Corsair-CX-Series-CX750-Sammenlign-Priser" xlink:type="simple">https://www.pricerunner.dk/pl/640-3218533316/Stroemforsyning/Corsair-CX-Series-CX750-Sammenlign-Priser</text:a>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bsolut bundpris</text:p>
          </table:table-cell>
          <table:table-cell/>
          <table:table-cell table:style-name="ce2" table:formula="of:=[.C11]-SUM([.D16:.D19])" office:value-type="float" office:value="7379" calcext:value-type="float">
            <text:p>7379</text:p>
          </table:table-cell>
          <table:table-cell table:number-columns-repeated="3"/>
        </table:table-row>
        <table:table-row table:style-name="ro1" table:number-rows-repeated="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8:14:52.609449219</meta:creation-date>
    <dc:date>2025-11-11T19:51:06.488134852</dc:date>
    <meta:editing-duration>PT1H15M23S</meta:editing-duration>
    <meta:editing-cycles>3</meta:editing-cycles>
    <meta:generator>LibreOffice/25.8.2.2$Linux_X86_64 LibreOffice_project/f7b0e4385108b95c134599502a7bccf0a41925c8</meta:generator>
    <meta:document-statistic meta:table-count="1" meta:cell-count="84" meta:object-count="0"/>
  </office:meta>
</office:document-meta>
</file>