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933cm"/>
    </style:style>
    <style:style style:name="co2" style:family="table-column">
      <style:table-column-properties fo:break-before="auto" style:column-width="5.877cm"/>
    </style:style>
    <style:style style:name="co3" style:family="table-column">
      <style:table-column-properties fo:break-before="auto" style:column-width="2.226cm"/>
    </style:style>
    <style:style style:name="co4" style:family="table-column">
      <style:table-column-properties fo:break-before="auto" style:column-width="16.877cm"/>
    </style:style>
    <style:style style:name="co5" style:family="table-column">
      <style:table-column-properties fo:break-before="auto" style:column-width="24.60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Komponent</text:p>
          </table:table-cell>
          <table:table-cell table:style-name="ce1" office:value-type="string" calcext:value-type="string">
            <text:p>SKU</text:p>
          </table:table-cell>
          <table:table-cell table:style-name="ce1" office:value-type="string" calcext:value-type="string">
            <text:p>Pris</text:p>
          </table:table-cell>
          <table:table-cell table:style-name="ce3" office:value-type="string" calcext:value-type="string">
            <text:p>Noter</text:p>
          </table:table-cell>
          <table:table-cell table:style-name="ce1" office:value-type="string" calcext:value-type="string">
            <text:p>Link til model</text:p>
          </table:table-cell>
          <table:table-cell/>
        </table:table-row>
        <table:table-row table:style-name="ro1">
          <table:table-cell office:value-type="string" calcext:value-type="string">
            <text:p>Bundkort</text:p>
          </table:table-cell>
          <table:table-cell office:value-type="string" calcext:value-type="string">
            <text:p>B650 eller B850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Billigste sikre model med kapacitet til opgradering</text:p>
          </table:table-cell>
          <table:table-cell office:value-type="string" calcext:value-type="string">
            <text:p><text:a xlink:href="https://www.pricerunner.dk/pl/35-3415941407/Bundkort/MSI-B850M-Gaming-Plus-Wifi6E-AM5-Micro-ATX-Support-Sammenlign-Priser" xlink:type="simple">https://www.pricerunner.dk/pl/35-3415941407/Bundkort/MSI-B850M-Gaming-Plus-Wifi6E-AM5-Micro-ATX-Support-Sammenlign-Priser</text:a></text:p>
          </table:table-cell>
          <table:table-cell/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7800x3D</text:p>
          </table:table-cell>
          <table:table-cell office:value-type="float" office:value="2330" calcext:value-type="float">
            <text:p>2330</text:p>
          </table:table-cell>
          <table:table-cell office:value-type="string" calcext:value-type="string">
            <text:p>ca. 2-3% langsommere end 9800x3D som koster markant mere</text:p>
          </table:table-cell>
          <table:table-cell office:value-type="string" calcext:value-type="string">
            <text:p><text:a xlink:href="https://www.pricerunner.dk/pl/40-3214876618/CPUs/AMD-Ryzen-7-7800X3D-4.20GHz-Socket-AM5-Tray-Sammenlign-Priser" xlink:type="simple">https://www.pricerunner.dk/pl/40-3214876618/CPUs/AMD-Ryzen-7-7800X3D-4.20GHz-Socket-AM5-Tray-Sammenlign-Priser</text:a> </text:p>
          </table:table-cell>
          <table:table-cell/>
        </table:table-row>
        <table:table-row table:style-name="ro1">
          <table:table-cell office:value-type="string" calcext:value-type="string">
            <text:p>Køler</text:p>
          </table:table-cell>
          <table:table-cell office:value-type="string" calcext:value-type="string">
            <text:p>Arctic Freezer III 240, 280 eller 360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Vandkøling er at foretrække, men en god luftkøler kan også gå an – de er dog ofte dyrere</text:p>
          </table:table-cell>
          <table:table-cell office:value-type="string" calcext:value-type="string">
            <text:p><text:a xlink:href="https://www.pricerunner.dk/pl/184-3412618176/Computer-koeling/Arctic-Liquid-Freezer-III-Pro-240-CPU-Water-Cooler-Sammenlign-Priser" xlink:type="simple">https://www.pricerunner.dk/pl/184-3412618176/Computer-koeling/Arctic-Liquid-Freezer-III-Pro-240-CPU-Water-Cooler-Sammenlign-Priser</text:a> </text:p>
          </table:table-cell>
          <table:table-cell/>
        </table:table-row>
        <table:table-row table:style-name="ro2">
          <table:table-cell office:value-type="string" calcext:value-type="string">
            <text:p>RAM</text:p>
          </table:table-cell>
          <table:table-cell office:value-type="string" calcext:value-type="string">
            <text:p>2x16GB DDR5 6000mhz</text:p>
          </table:table-cell>
          <table:table-cell office:value-type="float" office:value="3099" calcext:value-type="float">
            <text:p>3099</text:p>
          </table:table-cell>
          <table:table-cell office:value-type="string" calcext:value-type="string">
            <text:p>Langsommere RAM kan også gå an m. X3D.</text:p>
            <text:p>OBS: Model er ikke på bundkortets QVL liste, men normalvis virker det altså fint uanset.</text:p>
          </table:table-cell>
          <table:table-cell office:value-type="string" calcext:value-type="string">
            <text:p><text:a xlink:href="https://www.pricerunner.dk/pl/38-3390419137/RAM/G.Skill-Aegis-5-Black-DDR5-6000MHz-2x16GB-%28F5-6000J3636F16GX2-IS%29-Sammenlign-Priser" xlink:type="simple">https://www.pricerunner.dk/pl/38-3390419137/RAM/G.Skill-Aegis-5-Black-DDR5-6000MHz-2x16GB-%28F5-6000J3636F16GX2-IS%29-Sammenlign-Priser</text:a> </text:p>
          </table:table-cell>
          <table:table-cell/>
        </table:table-row>
        <table:table-row table:style-name="ro1">
          <table:table-cell office:value-type="string" calcext:value-type="string">
            <text:p>SSD</text:p>
          </table:table-cell>
          <table:table-cell office:value-type="string" calcext:value-type="string">
            <text:p>1TB NVME PCI-E gen 4 el. 5</text:p>
          </table:table-cell>
          <table:table-cell office:value-type="float" office:value="1370" calcext:value-type="float">
            <text:p>1370</text:p>
          </table:table-cell>
          <table:table-cell office:value-type="string" calcext:value-type="string">
            <text:p>Billigste kvalitets SSD m. DRAM cache</text:p>
          </table:table-cell>
          <table:table-cell office:value-type="string" calcext:value-type="string">
            <text:p><text:a xlink:href="https://www.pricerunner.dk/pl/36-3203096003/Harddiske/Corsair-MP600-PRO-NH-CSSD-F1000GBMP600PNH-1TB-Sammenlign-Priser" xlink:type="simple">https://www.pricerunner.dk/pl/36-3203096003/Harddiske/Corsair-MP600-PRO-NH-CSSD-F1000GBMP600PNH-1TB-Sammenlign-Priser</text:a> </text:p>
          </table:table-cell>
          <table:table-cell/>
        </table:table-row>
        <table:table-row table:style-name="ro1">
          <table:table-cell office:value-type="string" calcext:value-type="string">
            <text:p>PSU</text:p>
          </table:table-cell>
          <table:table-cell office:value-type="string" calcext:value-type="string">
            <text:p>850W m. 5 udgange til CPU/GFX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Sikrer mulighed for CPU/GFX opgradering</text:p>
          </table:table-cell>
          <table:table-cell office:value-type="string" calcext:value-type="string">
            <text:p><text:a xlink:href="https://www.pricerunner.dk/pl/640-3341437049/Stroemforsyning/Seasonic-Focus-GX-850-850W-Stroemforsyning-Sammenlign-Priser" xlink:type="simple">https://www.pricerunner.dk/pl/640-3341437049/Stroemforsyning/Seasonic-Focus-GX-850-850W-Stroemforsyning-Sammenlign-Priser</text:a> </text:p>
          </table:table-cell>
          <table:table-cell/>
        </table:table-row>
        <table:table-row table:style-name="ro1">
          <table:table-cell office:value-type="string" calcext:value-type="string">
            <text:p>GFX</text:p>
          </table:table-cell>
          <table:table-cell office:value-type="string" calcext:value-type="string">
            <text:p>9070XT</text:p>
          </table:table-cell>
          <table:table-cell office:value-type="float" office:value="5390" calcext:value-type="float">
            <text:p>5390</text:p>
          </table:table-cell>
          <table:table-cell office:value-type="string" calcext:value-type="string">
            <text:p>Billigste fornuftige model</text:p>
          </table:table-cell>
          <table:table-cell office:value-type="string" calcext:value-type="string">
            <text:p><text:a xlink:href="https://www.pricerunner.dk/pl/37-3396506866/Grafikkort/Powercolor-Hellhound-RX9070XT-16G-L-OC-Sammenlign-Priser" xlink:type="simple">https://www.pricerunner.dk/pl/37-3396506866/Grafikkort/Powercolor-Hellhound-RX9070XT-16G-L-OC-Sammenlign-Priser</text:a> </text:p>
          </table:table-cell>
          <table:table-cell/>
        </table:table-row>
        <table:table-row table:style-name="ro1">
          <table:table-cell office:value-type="string" calcext:value-type="string">
            <text:p>Kabinet</text:p>
          </table:table-cell>
          <table:table-cell office:value-type="string" calcext:value-type="string">
            <text:p>Frit valg, dette er billigt og *ok*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Kan kun tage en 240mm AIO, da den altid bør monteres i toppen</text:p>
          </table:table-cell>
          <table:table-cell office:value-type="string" calcext:value-type="string">
            <text:p><text:a xlink:href="https://www.pricerunner.dk/pl/186-3413722573/Kabinetter/Montech-X3-Mesh-Tempered-Glass-Black-Sammenlign-Priser" xlink:type="simple">https://www.pricerunner.dk/pl/186-3413722573/Kabinetter/Montech-X3-Mesh-Tempered-Glass-Black-Sammenlign-Priser</text:a>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2" table:formula="of:=SUM([.C2:.C9])" office:value-type="float" office:value="14901" calcext:value-type="float">
            <text:p>14901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1" office:value-type="string" calcext:value-type="string">
            <text:p>Alternativer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Komponent</text:p>
          </table:table-cell>
          <table:table-cell table:style-name="ce1" office:value-type="string" calcext:value-type="string">
            <text:p>SKU</text:p>
          </table:table-cell>
          <table:table-cell table:style-name="ce1" office:value-type="string" calcext:value-type="string">
            <text:p>Pris forskel</text:p>
          </table:table-cell>
          <table:table-cell table:style-name="ce1" office:value-type="string" calcext:value-type="string">
            <text:p>Noter</text:p>
          </table:table-cell>
          <table:table-cell table:style-name="ce3" office:value-type="string" calcext:value-type="string">
            <text:p>Link til model</text:p>
          </table:table-cell>
          <table:table-cell table:style-name="ce1"/>
        </table:table-row>
        <table:table-row table:style-name="ro1">
          <table:table-cell office:value-type="string" calcext:value-type="string">
            <text:p>GFX</text:p>
          </table:table-cell>
          <table:table-cell office:value-type="string" calcext:value-type="string">
            <text:p>Nvidia 5070 TI</text:p>
          </table:table-cell>
          <table:table-cell table:formula="of:=6500-[.C8]" office:value-type="float" office:value="1110" calcext:value-type="float">
            <text:p>1110</text:p>
          </table:table-cell>
          <table:table-cell table:style-name="Default" office:value-type="string" calcext:value-type="string">
            <text:p>Kender ikke modellerne, da de (IMO) ikke giver mening at købe pga. Pris</text:p>
          </table:table-cell>
          <table:table-cell table:style-name="ce4"/>
          <table:table-cell/>
        </table:table-row>
        <table:table-row table:style-name="ro1">
          <table:table-cell office:value-type="string" calcext:value-type="string">
            <text:p>GFX</text:p>
          </table:table-cell>
          <table:table-cell office:value-type="string" calcext:value-type="string">
            <text:p>9070XT Reaper</text:p>
          </table:table-cell>
          <table:table-cell table:formula="of:=4890-[.C8]" office:value-type="float" office:value="-500" calcext:value-type="float">
            <text:p>-500</text:p>
          </table:table-cell>
          <table:table-cell table:style-name="Default" office:value-type="string" calcext:value-type="string">
            <text:p>Ret støjende køler, jeg ville ikke selv vælge den</text:p>
          </table:table-cell>
          <table:table-cell table:style-name="ce4" office:value-type="string" calcext:value-type="string">
            <text:p><text:a xlink:href="https://www.pricerunner.dk/pl/37-3396383352/Grafikkort/Powercolor-Reaper-RX9070XT-16G-A-Sammenlign-Priser" xlink:type="simple">https://www.pricerunner.dk/pl/37-3396383352/Grafikkort/Powercolor-Reaper-RX9070XT-16G-A-Sammenlign-Priser</text:a> </text:p>
          </table:table-cell>
          <table:table-cell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number-columns-repeated="2"/>
          <table:table-cell table:style-name="ce2"/>
          <table:table-cell table:number-columns-repeated="3"/>
        </table:table-row>
        <table:table-row table:style-name="ro1" table:number-rows-repeated="50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DK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DK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5">0000-00-00</text:date>, <text:time style:data-style-name="N2" text:time-value="18:08:19.97022354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1T18:14:52.609449219</meta:creation-date>
    <dc:date>2026-06-15T18:26:59.458194228</dc:date>
    <meta:editing-duration>PT1H21M24S</meta:editing-duration>
    <meta:editing-cycles>4</meta:editing-cycles>
    <meta:generator>LibreOffice/26.2.4.2$Linux_X86_64 LibreOffice_project/f4d82cf4d44730936b3f1a72d05a6253f577d3e9</meta:generator>
    <meta:document-statistic meta:table-count="1" meta:cell-count="61" meta:object-count="0"/>
  </office:meta>
</office:document-meta>
</file>